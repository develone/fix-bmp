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00000033A833667B0EB04C36C.png" manifest:media-type="image/png"/>
  <manifest:file-entry manifest:full-path="Pictures/10000000000006250000035E85085DC6A6B1989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29ef" officeooo:paragraph-rsid="000f29ef"/>
    </style:style>
    <style:style style:name="P2" style:family="paragraph" style:parent-style-name="Standard">
      <style:text-properties officeooo:rsid="000f29ef" officeooo:paragraph-rsid="0011beb6"/>
    </style:style>
    <style:style style:name="P3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f29ef" officeooo:paragraph-rsid="000f29ef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f29ef" officeooo:paragraph-rsid="000f29ef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3d6bb" officeooo:paragraph-rsid="0013d6bb"/>
    </style:style>
    <style:style style:name="P6" style:family="paragraph" style:parent-style-name="Standard">
      <style:text-properties officeooo:rsid="0011beb6" officeooo:paragraph-rsid="0011beb6"/>
    </style:style>
    <style:style style:name="P7" style:family="paragraph" style:parent-style-name="Standard">
      <style:text-properties officeooo:rsid="0013d6bb" officeooo:paragraph-rsid="0013d6bb"/>
    </style:style>
    <style:style style:name="T1" style:family="text">
      <style:text-properties officeooo:rsid="0013d6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Default******************</text:p>
      <text:p text:style-name="P4">Step <text:span text:style-name="T1">to </text:span>fix-bpm</text:p>
      <text:p text:style-name="P5">when compiled with</text:p>
      <text:p text:style-name="P5">-Wall -Werror</text:p>
      <text:p text:style-name="P4">06/01/26</text:p>
      <text:p text:style-name="P3">******************Default******************</text:p>
      <text:p text:style-name="P1"/>
      <text:p text:style-name="P7">Adding -Wall -Werror <text:s/>these 2 gcc flags to the scipts/compile.sh found several errors.</text:p>
      <text:p text:style-name="P7"/>
      <text:p text:style-name="P7">#!/bin/bash</text:p>
      <text:p text:style-name="P7">gcc -g -Wall -Werror src/bmp.c -o bmp</text:p>
      <text:p text:style-name="P7"/>
      <text:p text:style-name="P1">devel@pi5-80:~ $ git clone https://github.com/develone/fix-bmp.git</text:p>
      <text:p text:style-name="P1">devel@pi5-80:~ $ cd fix-bmp/</text:p>
      <text:p text:style-name="P1">devel@pi5-80:~/fix-bmp $ ./scipts/compile.sh</text:p>
      <text:p text:style-name="P1">devel@pi5-80:~/fix-bmp $ ./bmp "test-files/lena_rgb_2048.bmp" "out.bmp"</text:p>
      <text:p text:style-name="P1">input test-files/lena_rgb_2048.bmp output out.bmp</text:p>
      <text:p text:style-name="P1">number of header points 1 </text:p>
      <text:p text:style-name="P1">n 1 </text:p>
      <text:p text:style-name="P1">sizeof(bitmap_header) 54 </text:p>
      <text:p text:style-name="P1">hp-&gt;bitmapsize 12582912 </text:p>
      <text:p text:style-name="P1">number of data points 12582912 </text:p>
      <text:p text:style-name="P1">loop 0 data 39 data 57 </text:p>
      <text:p text:style-name="P1">loop 1 data 16 data 22 </text:p>
      <text:p text:style-name="P1">loop 2 data 52 data 82 </text:p>
      <text:p text:style-name="P1">loop 3 data 39 data 57 </text:p>
      <text:p text:style-name="P1">loop 4 data 16 data 22 </text:p>
      <text:p text:style-name="P1">loop 5 data 52 data 82 </text:p>
      <text:p text:style-name="P1">loop 6 data 39 data 57 </text:p>
      <text:p text:style-name="P1">loop 7 data 16 data 22 </text:p>
      <text:p text:style-name="P1">loop 8 </text:p>
      <text:p text:style-name="P1">Restoring data subtracting the size of loop</text:p>
      <text:p text:style-name="P1">hp-&gt;bitmapsize 12582912 </text:p>
      <text:p text:style-name="P1">width 2048 height 2048 </text:p>
      <text:p text:style-name="P1">hp-&gt;planes 1 </text:p>
      <text:p text:style-name="P1">hp-&gt;bitsperpixel 24 </text:p>
      <text:p text:style-name="P1">hp-&gt;bitmapsize 12582912 </text:p>
      <text:p text:style-name="P1">hp-&gt;horizontalres 2835 </text:p>
      <text:p text:style-name="P1">hp-&gt;verticalres 2835 </text:p>
      <text:p text:style-name="P1">hp-&gt;numcolors 0 </text:p>
      <text:p text:style-name="P1">hp-&gt;importantcolors 0 </text:p>
      <text:p text:style-name="P1"/>
      <text:p text:style-name="P1">devel@pi5-80:~/fix-bmp $ od -x test-files/lena_rgb_2048.bmp | less</text:p>
      <text:p text:style-name="P1">0000000 4d42 007a 00c0 0000 0000 007a 0000 006c</text:p>
      <text:p text:style-name="P1">0000020 0000 0800 0000 0800 0000 0001 0018 0000</text:p>
      <text:p text:style-name="P1">0000040 0000 0000 00c0 0b13 0000 0b13 0000 0000</text:p>
      <text:p text:style-name="P1">0000060 0000 0000 0000 4742 7352 0000 0000 0000</text:p>
      <text:p text:style-name="P1">0000100 0000 0000 0000 0000 0000 0000 0000 0000</text:p>
      <text:p text:style-name="P1">*</text:p>
      <text:p text:style-name="P1">0000140 0000 0000 0000 0000 0000 0002 0000 0000</text:p>
      <text:p text:style-name="P1">0000160 0000 0000 0000 0000 0000 1639 3952 5216</text:p>
      <text:p text:style-name="P1"><text:soft-page-break/>0000200 1639 3952 5116 1539 3951 5116 1739 3b53</text:p>
      <text:p text:style-name="P1"/>
      <text:p text:style-name="P1"/>
      <text:p text:style-name="P1"><draw:frame draw:style-name="fr2" draw:name="Image1" text:anchor-type="char" svg:width="6.6929in" svg:height="3.6673in" draw:z-index="0"><draw:image xlink:href="Pictures/10000000000006250000035E85085DC6A6B1989F.png" xlink:type="simple" xlink:show="embed" xlink:actuate="onLoad" draw:mime-type="image/png"/></draw:frame></text:p>
      <text:p text:style-name="P2"><text:s/></text:p>
      <text:p text:style-name="P2">devel@pi5-80:~/fix-bmp $ ./bmp "test-files/lena_rgb_256.bmp" "out.bmp"</text:p>
      <text:p text:style-name="P1">number of header points 1 </text:p>
      <text:p text:style-name="P1">n 1 </text:p>
      <text:p text:style-name="P1">sizeof(bitmap_header) 54 </text:p>
      <text:p text:style-name="P1">hp-&gt;bitmapsize 196608 </text:p>
      <text:p text:style-name="P1">number of data points 196608 </text:p>
      <text:p text:style-name="P1">loop 0 data 38 data 56 </text:p>
      <text:p text:style-name="P1">loop 1 data 15 data 21 </text:p>
      <text:p text:style-name="P1">loop 2 data 50 data 80 </text:p>
      <text:p text:style-name="P1">loop 3 data 3e data 62 </text:p>
      <text:p text:style-name="P1">loop 4 data 1e data 30 </text:p>
      <text:p text:style-name="P1">loop 5 data 5f data 95 </text:p>
      <text:p text:style-name="P1">loop 6 data 3c data 60 </text:p>
      <text:p text:style-name="P1">loop 7 data 19 data 25 </text:p>
      <text:p text:style-name="P1">loop 8 </text:p>
      <text:p text:style-name="P1">Restoring data subtracting the size of loop</text:p>
      <text:p text:style-name="P1">hp-&gt;bitmapsize 196608 </text:p>
      <text:p text:style-name="P1">width 256 height 256 </text:p>
      <text:p text:style-name="P1">hp-&gt;planes 1 </text:p>
      <text:p text:style-name="P1">hp-&gt;bitsperpixel 24 </text:p>
      <text:p text:style-name="P1">hp-&gt;bitmapsize 196608 </text:p>
      <text:p text:style-name="P1">hp-&gt;horizontalres 2835 </text:p>
      <text:p text:style-name="P1">hp-&gt;verticalres 2835 </text:p>
      <text:p text:style-name="P1">hp-&gt;numcolors 0 </text:p>
      <text:p text:style-name="P1">hp-&gt;importantcolors 0</text:p>
      <text:p text:style-name="P1"/>
      <text:p text:style-name="P1">devel@pi5-80:~/fix-bmp $ od -x test-files/lena_rgb_256.bmp | less</text:p>
      <text:p text:style-name="P1">0000000 4d42 007a 0003 0000 0000 007a 0000 006c</text:p>
      <text:p text:style-name="P1"><text:soft-page-break/>0000020 0000 0100 0000 0100 0000 0001 0018 0000</text:p>
      <text:p text:style-name="P1">0000040 0000 0000 0003 0b13 0000 0b13 0000 0000</text:p>
      <text:p text:style-name="P1">0000060 0000 0000 0000 4742 7352 0000 0000 0000</text:p>
      <text:p text:style-name="P1">0000100 0000 0000 0000 0000 0000 0000 0000 0000</text:p>
      <text:p text:style-name="P1">*</text:p>
      <text:p text:style-name="P1">0000140 0000 0000 0000 0000 0000 0002 0000 0000</text:p>
      <text:p text:style-name="P1">0000160 0000 0000 0000 0000 0000 1538 3e50 5f1e</text:p>
      <text:p text:style-name="P1">0000200 193c 3d5f 5c1a 2043 3c60 5a16 1947 655d</text:p>
      <text:p text:style-name="P1"/>
      <text:p text:style-name="P6">xx</text:p>
      <text:p text:style-name="P6"><draw:frame draw:style-name="fr1" draw:name="Image2" text:anchor-type="char" svg:width="6.6929in" svg:height="3.5252in" draw:z-index="1"><draw:image xlink:href="Pictures/10000000000006200000033A833667B0EB04C36C.png" xlink:type="simple" xlink:show="embed" xlink:actuate="onLoad" draw:mime-type="image/png"/></draw:frame></text:p>
      <text:p text:style-name="P6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06:30:13.211235622</meta:creation-date>
    <dc:date>2026-06-01T07:07:21.656055441</dc:date>
    <meta:editing-duration>PT37M9S</meta:editing-duration>
    <meta:editing-cycles>6</meta:editing-cycles>
    <meta:generator>LibreOffice/7.4.7.2$Linux_AARCH64 LibreOffice_project/40$Build-2</meta:generator>
    <meta:document-statistic meta:table-count="0" meta:image-count="2" meta:object-count="0" meta:page-count="3" meta:paragraph-count="86" meta:word-count="406" meta:character-count="2541" meta:non-whitespace-character-count="2173"/>
  </office:meta>
</office:document-meta>
</file>