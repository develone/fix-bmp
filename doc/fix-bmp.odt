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earched bitmap - reading/writing bmp files in c</text:p>
      <text:p text:style-name="Standard">Found this link https://stackoverflow.com/questions/11129138/reading-writing-bmp-files-in-c</text:p>
      <text:p text:style-name="Standard">The code required a fix</text:p>
      <text:p text:style-name="Standard"><text:s/></text:p>
      <text:p text:style-name="Standard">devel@pi4-50:~ $ git clone https://github.com/develone/fix-bmp.git</text:p>
      <text:p text:style-name="Standard">Cloning into 'fix-bmp'...</text:p>
      <text:p text:style-name="Standard">remote: Enumerating objects: 16, done.</text:p>
      <text:p text:style-name="Standard">remote: Counting objects: 100% (16/16), done.</text:p>
      <text:p text:style-name="Standard">remote: Compressing objects: 100% (11/11), done.</text:p>
      <text:p text:style-name="Standard">remote: Total 16 (delta 2), reused 15 (delta 1), pack-reused 0 (from 0)</text:p>
      <text:p text:style-name="Standard">Receiving objects: 100% (16/16), 238.78 KiB | 804.00 KiB/s, done.</text:p>
      <text:p text:style-name="Standard">Resolving deltas: 100% (2/2), done.</text:p>
      <text:p text:style-name="Standard">devel@pi4-50:~ $ cd fix-bmp/</text:p>
      <text:p text:style-name="Standard">devel@pi4-50:~/fix-bmp $ mousepad scipts/compile.sh &amp;</text:p>
      <text:p text:style-name="Standard">[1] 27423</text:p>
      <text:p text:style-name="Standard">devel@pi4-50:~/fix-bmp $ chmod +x scipts/compile.sh </text:p>
      <text:p text:style-name="Standard">devel@pi4-50:~/fix-bmp $ ./scipts/compile.sh </text:p>
      <text:p text:style-name="Standard">devel@pi4-50:~/fix-bmp $ ls</text:p>
      <text:p text:style-name="Standard">bmp <text:s/>compile.sh <text:s/>doc <text:s/>src <text:s/>test-files</text:p>
      <text:p text:style-name="Standard">devel@pi4-50:~/fix-bmp $ ./bmp test-files/lena_rgb_128.bmp out.bmp</text:p>
      <text:p text:style-name="Standard">input test-files/lena_rgb_64.bmp output out.bmp</text:p>
      <text:p text:style-name="Standard">n 1 </text:p>
      <text:p text:style-name="Standard">sizeof(bitmap_header) 54 </text:p>
      <text:p text:style-name="Standard">n hp-&gt;bitmapsize 12288 </text:p>
      <text:p text:style-name="Standard">width 64 height 64 </text:p>
      <text:p text:style-name="Standard">numcolors 0</text:p>
      <text:p text:style-name="Standard"/>
      <text:p text:style-name="Standard">devel@pi4-50:~/fix-bmp $ tree</text:p>
      <text:p text:style-name="Standard">.</text:p>
      <text:p text:style-name="Standard">├── bmp</text:p>
      <text:p text:style-name="Standard">├── doc</text:p>
      <text:p text:style-name="Standard">│   └── diff-fix-bmp.txt</text:p>
      <text:p text:style-name="Standard">├── out.bmp</text:p>
      <text:p text:style-name="Standard">├── scipts</text:p>
      <text:p text:style-name="Standard">│   └── compile.sh</text:p>
      <text:p text:style-name="Standard">├── src</text:p>
      <text:p text:style-name="Standard">│   └── bmp.c</text:p>
      <text:p text:style-name="Standard">└── test-files</text:p>
      <text:p text:style-name="Standard"><text:s text:c="4"/>├── lena_rgb_128.bmp</text:p>
      <text:p text:style-name="Standard"><text:s text:c="4"/>├── lena_rgb_256.bmp</text:p>
      <text:p text:style-name="Standard"><text:s text:c="4"/>└── lena_rgb_64.bmp</text:p>
      <text:p text:style-name="Standard">see doc/diff-fix-bmp.txt for changes to get the code to compile.</text:p>
      <text:p text:style-name="Standard"/>
      <text:p text:style-name="Standard"/>
      <text:p text:style-name="Standard">5 directories, 8 fi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0:40:59.194208419</meta:creation-date>
    <dc:date>2026-05-19T10:42:44.326576172</dc:date>
    <meta:editing-duration>PT1M48S</meta:editing-duration>
    <meta:editing-cycles>1</meta:editing-cycles>
    <meta:document-statistic meta:table-count="0" meta:image-count="0" meta:object-count="0" meta:page-count="1" meta:paragraph-count="42" meta:word-count="164" meta:character-count="1300" meta:non-whitespace-character-count="1148"/>
    <meta:generator>LibreOffice/7.4.7.2$Linux_AARCH64 LibreOffice_project/40$Build-2</meta:generator>
  </office:meta>
</office:document-meta>
</file>